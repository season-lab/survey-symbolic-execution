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68cm" fo:min-width="1.353cm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28cm" draw:marker-start-width="0.242cm" draw:marker-end="Arrow_20_concave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draw:marker-start="Arrow_20_concave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Liberation Serif'" style:font-family-generic="roman" style:font-pitch="variable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family="Times" style:font-family-generic="roman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family="Times" style:font-family-generic="roman" style:font-pitch="variable" fo:font-size="11pt" style:font-size-asian="11pt" style:font-size-complex="11pt"/>
    </style:style>
    <style:style style:name="T1" style:family="text">
      <style:text-properties fo:font-family="Times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27cm" svg:x="0.554cm" svg:y="0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27cm" svg:x="5.359cm" svg:y="0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27cm" svg:x="10.226cm" svg:y="0.1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586cm" svg:y1="0.607cm" svg:x2="5.253cm" svg:y2="0.607cm">
          <text:p/>
        </draw:line>
        <draw:line draw:style-name="gr2" draw:text-style-name="P2" draw:layer="layout" svg:x1="7.416cm" svg:y1="0.619cm" svg:x2="10.083cm" svg:y2="0.619cm">
          <text:p/>
        </draw:line>
        <draw:line draw:style-name="gr3" draw:text-style-name="P2" draw:layer="layout" svg:x1="7.377cm" svg:y1="1.023cm" svg:x2="10.044cm" svg:y2="1.023cm">
          <text:p/>
        </draw:line>
        <draw:line draw:style-name="gr3" draw:text-style-name="P2" draw:layer="layout" svg:x1="2.542cm" svg:y1="1.005cm" svg:x2="5.209cm" svg:y2="1.005cm">
          <text:p/>
        </draw:line>
        <draw:frame draw:style-name="gr4" draw:text-style-name="P4" draw:layer="layout" svg:width="1.755cm" svg:height="0.607cm" svg:x="3.012cm" svg:y="0.055cm">
          <draw:text-box>
            <text:p text:style-name="P3"><text:span text:style-name="T1">lowering</text:span></text:p>
          </draw:text-box>
        </draw:frame>
        <draw:frame draw:style-name="gr4" draw:text-style-name="P6" draw:layer="layout" svg:width="1.425cm" svg:height="0.963cm" svg:x="0.814cm" svg:y="0.337cm">
          <draw:text-box>
            <text:p text:style-name="P5"><text:span text:style-name="T1">source</text:span><text:span text:style-name="T1"><text:line-break/></text:span><text:span text:style-name="T1">code</text:span></text:p>
          </draw:text-box>
        </draw:frame>
        <draw:frame draw:style-name="gr4" draw:text-style-name="P4" draw:layer="layout" svg:width="0.853cm" svg:height="0.607cm" svg:x="5.878cm" svg:y="0.508cm">
          <draw:text-box>
            <text:p text:style-name="P3"><text:span text:style-name="T1">IR</text:span></text:p>
          </draw:text-box>
        </draw:frame>
        <draw:frame draw:style-name="gr4" draw:text-style-name="P4" draw:layer="layout" svg:width="1.755cm" svg:height="0.607cm" svg:x="7.773cm" svg:y="0.056cm">
          <draw:text-box>
            <text:p text:style-name="P3"><text:span text:style-name="T1">lowering</text:span></text:p>
          </draw:text-box>
        </draw:frame>
        <draw:frame draw:style-name="gr4" draw:text-style-name="P4" draw:layer="layout" svg:width="1.366cm" svg:height="0.607cm" svg:x="7.974cm" svg:y="1.033cm">
          <draw:text-box>
            <text:p text:style-name="P3"><text:span text:style-name="T1">lifting</text:span></text:p>
          </draw:text-box>
        </draw:frame>
        <draw:frame draw:style-name="gr4" draw:text-style-name="P4" draw:layer="layout" svg:width="1.366cm" svg:height="0.607cm" svg:x="3.186cm" svg:y="1.034cm">
          <draw:text-box>
            <text:p text:style-name="P3"><text:span text:style-name="T1">lifting</text:span></text:p>
          </draw:text-box>
        </draw:frame>
        <draw:frame draw:style-name="gr4" draw:text-style-name="P6" draw:layer="layout" svg:width="1.404cm" svg:height="0.963cm" svg:x="10.479cm" svg:y="0.338cm">
          <draw:text-box>
            <text:p text:style-name="P5"><text:span text:style-name="T1">binary</text:span><text:span text:style-name="T1"><text:line-break/></text:span><text:span text:style-name="T1">c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.7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07T16:51:02.312468170</meta:creation-date>
    <dc:date>2016-09-23T08:45:22</dc:date>
    <meta:editing-duration>PT31M18S</meta:editing-duration>
    <meta:editing-cycles>7</meta:editing-cycles>
    <meta:generator>OpenOffice/4.1.1$Unix OpenOffice.org_project/411m6$Build-9775</meta:generator>
    <dc:creator>Camil Demetrescu</dc:creator>
    <meta:document-statistic meta:object-count="14"/>
  </office:meta>
</office:document-meta>
</file>